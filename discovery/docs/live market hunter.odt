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thropic Sans" svg:font-family="'Anthropic Sans', system-ui, 'Segoe UI', Roboto, Helvetica, Arial, sans-serif"/>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3.6139in" table:align="left"/>
    </style:style>
    <style:style style:name="Table1.A" style:family="table-column">
      <style:table-column-properties style:column-width="1.7549in"/>
    </style:style>
    <style:style style:name="Table1.B" style:family="table-column">
      <style:table-column-properties style:column-width="1.859in"/>
    </style:style>
    <style:style style:name="Table1.A1" style:family="table-cell">
      <style:table-cell-properties style:vertical-align="middle" fo:padding="0.0194in" fo:border="none"/>
    </style:style>
    <style:style style:name="Table2" style:family="table">
      <style:table-properties style:width="5.6729in" table:align="left"/>
    </style:style>
    <style:style style:name="Table2.A" style:family="table-column">
      <style:table-column-properties style:column-width="2.5715in"/>
    </style:style>
    <style:style style:name="Table2.B" style:family="table-column">
      <style:table-column-properties style:column-width="3.1014in"/>
    </style:style>
    <style:style style:name="Table2.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4">
      <style:text-properties officeooo:paragraph-rsid="00090167"/>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T1" style:family="text">
      <style:text-properties officeooo:rsid="00073c77"/>
    </style:style>
    <style:style style:name="T2" style:family="text">
      <style:text-properties officeooo:rsid="0009016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n automated reverse-engineering pipeline. Instead of you manually opening 10 tabs and reading sales counts, a system does it continuously and scores opportunities by real signals, not guesses.</text:p>
      <text:h text:style-name="Heading_20_2" text:outline-level="2">What This System CAN Do</text:h>
      <text:list text:style-name="L1">
        <text:list-item>
          <text:p text:style-name="P3">Pull live data from multiple platforms in parallel </text:p>
        </text:list-item>
        <text:list-item>
          <text:p text:style-name="P3">Score categories by actual sales density, not assumption </text:p>
        </text:list-item>
        <text:list-item>
          <text:p text:style-name="P3">Flag stale listings (your competitive opening) </text:p>
        </text:list-item>
        <text:list-item>
          <text:p text:style-name="P3">Detect "ghost towns" — categories with zero or near-zero sales activity </text:p>
        </text:list-item>
        <text:list-item>
          <text:p text:style-name="P2">Surface this daily/weekly instead of manually </text:p>
        </text:list-item>
      </text:list>
      <text:h text:style-name="Heading_20_2" text:outline-level="2">The Architecture</text:h>
      <text:h text:style-name="Heading_20_3" text:outline-level="3">Layer 1 — Data Collection</text:h>
      <text:p text:style-name="Text_20_body"><text:span text:style-name="Strong_20_Emphasis">Grok API</text:span> — real-time web/X search, good for catching live complaint threads, trending pain points, recent platform chatter.</text:p>
      <text:p text:style-name="Text_20_body"><text:span text:style-name="Strong_20_Emphasis">Direct scrapers</text:span> (Python + BeautifulSoup/Playwright on your GCP instance) — pull structured data from marketplace search results: price, sales count, last-updated date, review count, seller name.</text:p>
      <text:p text:style-name="Text_20_body"><text:span text:style-name="Strong_20_Emphasis">Targets:</text:span> CodeCanyon, Getly, ProductHunt, G2/Capterra review pages, Reddit <text:span text:style-name="T1">and addable platforms </text:span>via Pushshift-style search.</text:p>
      <text:h text:style-name="Heading_20_3" text:outline-level="3">Layer 2 — Signal Scoring Engine</text:h>
      <text:p text:style-name="Text_20_body">For every category/product found, compute:</text:p>
      <table:table table:name="Table1" table:style-name="Table1">
        <table:table-column table:style-name="Table1.A"/>
        <table:table-column table:style-name="Table1.B"/>
        <table:table-header-rows>
          <table:table-row>
            <table:table-cell table:style-name="Table1.A1" office:value-type="string">
              <text:p text:style-name="Table_20_Heading">Signal</text:p>
            </table:table-cell>
            <table:table-cell table:style-name="Table1.A1" office:value-type="string">
              <text:p text:style-name="Table_20_Heading">What it tells you</text:p>
            </table:table-cell>
          </table:table-row>
        </table:table-header-rows>
        <table:table-row>
          <table:table-cell table:style-name="Table1.A1" office:value-type="string">
            <text:p text:style-name="Table_20_Contents">Sales count</text:p>
          </table:table-cell>
          <table:table-cell table:style-name="Table1.A1" office:value-type="string">
            <text:p text:style-name="Table_20_Contents">Proven demand</text:p>
          </table:table-cell>
        </table:table-row>
        <table:table-row>
          <table:table-cell table:style-name="Table1.A1" office:value-type="string">
            <text:p text:style-name="Table_20_Contents">Days since last update</text:p>
          </table:table-cell>
          <table:table-cell table:style-name="Table1.A1" office:value-type="string">
            <text:p text:style-name="Table_20_Contents">Staleness — your opening</text:p>
          </table:table-cell>
        </table:table-row>
        <table:table-row>
          <table:table-cell table:style-name="Table1.A1" office:value-type="string">
            <text:p text:style-name="Table_20_Contents">Review sentiment</text:p>
          </table:table-cell>
          <table:table-cell table:style-name="Table1.A1" office:value-type="string">
            <text:p text:style-name="Table_20_Contents">Pain points to exploit</text:p>
          </table:table-cell>
        </table:table-row>
        <table:table-row>
          <table:table-cell table:style-name="Table1.A1" office:value-type="string">
            <text:p text:style-name="Table_20_Contents">Price spread</text:p>
          </table:table-cell>
          <table:table-cell table:style-name="Table1.A1" office:value-type="string">
            <text:p text:style-name="Table_20_Contents">Market tolerance</text:p>
          </table:table-cell>
        </table:table-row>
        <table:table-row>
          <table:table-cell table:style-name="Table1.A1" office:value-type="string">
            <text:p text:style-name="Table_20_Contents">Listing count in category</text:p>
          </table:table-cell>
          <table:table-cell table:style-name="Table1.A1" office:value-type="string">
            <text:p text:style-name="Table_20_Contents">Saturation level</text:p>
          </table:table-cell>
        </table:table-row>
        <table:table-row>
          <table:table-cell table:style-name="Table1.A1" office:value-type="string">
            <text:p text:style-name="Table_20_Contents">Top seller's update gap</text:p>
          </table:table-cell>
          <table:table-cell table:style-name="Table1.A1" office:value-type="string">
            <text:p text:style-name="Table_20_Contents">Competitive vulnerability</text:p>
          </table:table-cell>
        </table:table-row>
      </table:table>
      <text:p text:style-name="Text_20_body"><text:span text:style-name="Strong_20_Emphasis">Ghost town detection logic:</text:span></text:p>
      <text:p text:style-name="Preformatted_20_Text"><text:span text:style-name="Source_20_Text">if avg_sales_in_category &lt; 5 AND listing_count &lt; 10:</text:span></text:p>
      <text:p text:style-name="Preformatted_20_Text"><text:span text:style-name="Source_20_Text"><text:s text:c="4"/>flag = "GHOST TOWN — likely no real buyer traffic"</text:span></text:p>
      <text:p text:style-name="Preformatted_20_Text"><text:span text:style-name="Source_20_Text">elif avg_sales_in_category &gt; 50 AND top_seller_last_update &gt; 12_months:</text:span></text:p>
      <text:p text:style-name="P1"><text:span text:style-name="Source_20_Text"><text:s text:c="4"/>flag = "HIGH LEVERAGE — proven demand + stale competition"</text:span></text:p>
      <text:h text:style-name="Heading_20_3" text:outline-level="3">Layer 3 — Opportunity Ranking</text:h>
      <text:p text:style-name="Text_20_body">Output a ranked list:</text:p>
      <text:p text:style-name="Preformatted_20_Text"><text:span text:style-name="Source_20_Text">1. React Native Booking Template — CodeCanyon</text:span></text:p>
      <text:p text:style-name="Preformatted_20_Text"><text:span text:style-name="Source_20_Text"><text:s text:c="3"/>Proven sales: 275-860 across top 3 listings</text:span></text:p>
      <text:p text:style-name="Preformatted_20_Text"><text:span text:style-name="Source_20_Text"><text:s text:c="3"/>Staleness: top seller unedited since 2024</text:span></text:p>
      <text:p text:style-name="Preformatted_20_Text"><text:span text:style-name="Source_20_Text"><text:s text:c="3"/>Verdict: HIGH LEVERAGE</text:span></text:p>
      <text:p text:style-name="Preformatted_20_Text"/>
      <text:p text:style-name="Preformatted_20_Text"><text:span text:style-name="Source_20_Text">2. SaaS Boilerplate — Getly</text:span></text:p>
      <text:p text:style-name="Preformatted_20_Text"><text:span text:style-name="Source_20_Text"><text:s text:c="3"/>Proven sales: 0 visible</text:span></text:p>
      <text:p text:style-name="Preformatted_20_Text"><text:soft-page-break/><text:span text:style-name="Source_20_Text"><text:s text:c="3"/>Listings: 0</text:span></text:p>
      <text:p text:style-name="P1"><text:span text:style-name="Source_20_Text"><text:s text:c="3"/>Verdict: GHOST TOWN — skip</text:span></text:p>
      <text:h text:style-name="Heading_20_3" text:outline-level="3">Layer 4 — Refresh Cycle</text:h>
      <text:p text:style-name="Text_20_body">Runs weekly on GCP Cloud Run + Cloud Scheduler. Costs near-zero against your $300 credit. Re-scores opportunities as listings update.</text:p>
      <text:h text:style-name="Heading_20_2" text:outline-level="2">The Real Risk</text:h>
      <text:p text:style-name="Text_20_body">Scraping marketplaces violates most ToS technically. Low enforcement risk at low request volume, but worth knowing. Grok's web access sidesteps this partially since it's not you directly hitting their servers at scale.<text:line-break/></text:p>
      <text:p text:style-name="Text_20_body">The aim is not <text:span text:style-name="T1">excplicity </text:span>categories. That incomplete research. The aim is not also analyse and watch what category is doing fine or not. The total aim is to zero down on product opportunities. Meaning. The system shd be intelligent enough to score products and find a product gap, which is a direct action point. Not just analyse random data. 2. The system shhd have platforms that are pre-designed in to it. (like the ones I've mentioned.) it shd also allow for expansion and adding other platforms. Flexibility.<text:line-break/><text:line-break/><text:line-break/>Got it. Sharper target: not "this category looks healthy" — but <text:span text:style-name="Strong_20_Emphasis">"build exactly this product, here's why, here's the gap, here's the price."</text:span> A direct action point, not a report.</text:p>
      <text:p text:style-name="Horizontal_20_Line"/>
      <text:h text:style-name="Heading_20_2" text:outline-level="2">The Corrected System Design</text:h>
      <text:h text:style-name="Heading_20_3" text:outline-level="3">What "Product Gap" Actually Means As Output</text:h>
      <text:p text:style-name="Text_20_body">Not "React Native templates are doing well." Instead:</text:p>
      <text:p text:style-name="Preformatted_20_Text"><text:span text:style-name="Source_20_Text">PRODUCT GAP DETECTED</text:span></text:p>
      <text:p text:style-name="Preformatted_20_Text"><text:span text:style-name="Source_20_Text">Platform: CodeCanyon</text:span></text:p>
      <text:p text:style-name="Preformatted_20_Text"><text:span text:style-name="Source_20_Text">Category: React Native &gt; E-commerce</text:span></text:p>
      <text:p text:style-name="Preformatted_20_Text"><text:span text:style-name="Source_20_Text">Gap: No template updated since Expo SDK 50. Current is SDK 52.</text:span></text:p>
      <text:p text:style-name="Preformatted_20_Text"><text:span text:style-name="Source_20_Text">Top 3 competitors average 400+ sales but all built on deprecated Expo Router v2.</text:span></text:p>
      <text:p text:style-name="Preformatted_20_Text"><text:span text:style-name="Source_20_Text">Action: Build identical scope, Expo SDK 52, Expo Router v4, $39 price point.</text:span></text:p>
      <text:p text:style-name="P1"><text:span text:style-name="Source_20_Text">Confidence: HIGH — 1,200+ combined sales prove demand, zero current-gen competitor.</text:span></text:p>
      <text:p text:style-name="Text_20_body">That's a direct action point. Not analysis. A build order.</text:p>
      <text:p text:style-name="Horizontal_20_Line"/>
      <text:h text:style-name="Heading_20_2" text:outline-level="2"><text:soft-page-break/>Revised Architecture</text:h>
      <text:h text:style-name="Heading_20_3" text:outline-level="3">Pre-Loaded Platform Modules (your named ones + standard extensible interface)</text:h>
      <text:p text:style-name="Preformatted_20_Text"><text:span text:style-name="Source_20_Text">/platforms</text:span></text:p>
      <text:p text:style-name="Preformatted_20_Text"><text:span text:style-name="Source_20_Text"><text:s text:c="2"/>├── codecanyon.py</text:span></text:p>
      <text:p text:style-name="Preformatted_20_Text"><text:span text:style-name="Source_20_Text"><text:s text:c="2"/>├── getly.py</text:span></text:p>
      <text:p text:style-name="Preformatted_20_Text"><text:span text:style-name="Source_20_Text"><text:s text:c="2"/>├── gumroad.py</text:span></text:p>
      <text:p text:style-name="Preformatted_20_Text"><text:span text:style-name="Source_20_Text"><text:s text:c="2"/>├── productHunt.py</text:span></text:p>
      <text:p text:style-name="Preformatted_20_Text"><text:span text:style-name="Source_20_Text"><text:s text:c="2"/>├── g2_reviews.py</text:span></text:p>
      <text:p text:style-name="P1"><text:span text:style-name="Source_20_Text"><text:s text:c="2"/>└── template.py <text:s/>← blueprint for adding any new platform</text:span></text:p>
      <text:p text:style-name="Text_20_body">Each module implements the same interface:</text:p>
      <text:p text:style-name="Preformatted_20_Text"><text:span text:style-name="Source_20_Text">class PlatformAdapter:</text:span></text:p>
      <text:p text:style-name="Preformatted_20_Text"><text:span text:style-name="Source_20_Text"><text:s text:c="4"/>def fetch_listings(category): ...</text:span></text:p>
      <text:p text:style-name="Preformatted_20_Text"><text:span text:style-name="Source_20_Text"><text:s text:c="4"/>def get_sales_data(listing): ...</text:span></text:p>
      <text:p text:style-name="Preformatted_20_Text"><text:span text:style-name="Source_20_Text"><text:s text:c="4"/>def get_last_updated(listing): ...</text:span></text:p>
      <text:p text:style-name="P1"><text:span text:style-name="Source_20_Text"><text:s text:c="4"/>def get_reviews(listing): ...</text:span></text:p>
      <text:p text:style-name="Text_20_body">This is the flexibility you asked for — adding a new platform means writing one file matching this interface. Nothing else in the system changes.</text:p>
      <text:p text:style-name="Horizontal_20_Line"/>
      <text:h text:style-name="Heading_20_3" text:outline-level="3">The Gap-Detection Engine (this is the actual intelligence layer)</text:h>
      <text:p text:style-name="Text_20_body">For every product in a category, the system computes a <text:span text:style-name="Strong_20_Emphasis">gap score</text:span>, not a category score:</text:p>
      <text:p text:style-name="Preformatted_20_Text"><text:span text:style-name="Source_20_Text">def detect_gap(product, category_products):</text:span></text:p>
      <text:p text:style-name="Preformatted_20_Text"><text:span text:style-name="Source_20_Text"><text:s text:c="4"/>signals = {</text:span></text:p>
      <text:p text:style-name="Preformatted_20_Text"><text:span text:style-name="Source_20_Text"><text:s text:c="8"/>"sales_proof": product.sales_count,</text:span></text:p>
      <text:p text:style-name="Preformatted_20_Text"><text:span text:style-name="Source_20_Text"><text:s text:c="8"/>"staleness_months": months_since(product.last_updated),</text:span></text:p>
      <text:p text:style-name="Preformatted_20_Text"><text:span text:style-name="Source_20_Text"><text:s text:c="8"/>"tech_obsolescence": check_deprecated_stack(product.tags),</text:span></text:p>
      <text:p text:style-name="Preformatted_20_Text"><text:span text:style-name="Source_20_Text"><text:s text:c="8"/>"complaint_density": count_negative_reviews(product.reviews),</text:span></text:p>
      <text:p text:style-name="Preformatted_20_Text"><text:span text:style-name="Source_20_Text"><text:s text:c="8"/>"price_point": product.price,</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gap_score = (</text:span></text:p>
      <text:p text:style-name="Preformatted_20_Text"><text:span text:style-name="Source_20_Text"><text:s text:c="8"/>signals["sales_proof"] * 0.4 +</text:span></text:p>
      <text:p text:style-name="Preformatted_20_Text"><text:span text:style-name="Source_20_Text"><text:s text:c="8"/>signals["staleness_months"] * 0.3 +</text:span></text:p>
      <text:p text:style-name="Preformatted_20_Text"><text:span text:style-name="Source_20_Text"><text:s text:c="8"/>signals["complaint_density"] * 0.2 +</text:span></text:p>
      <text:p text:style-name="Preformatted_20_Text"><text:span text:style-name="Source_20_Text"><text:s text:c="8"/>signals["tech_obsolescence"] * 0.1</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if gap_score &gt; THRESHOLD:</text:span></text:p>
      <text:p text:style-name="P1"><text:span text:style-name="Source_20_Text"><text:s text:c="8"/>return build_action_card(product, signals)</text:span></text:p>
      <text:p text:style-name="Text_20_body">The output isn't "this category is healthy." It's: <text:span text:style-name="Strong_20_Emphasis">this specific product, sold this many times, has this specific weakness, here's what to build instead.</text:span></text:p>
      <text:p text:style-name="Horizontal_20_Line"/>
      <text:h text:style-name="Heading_20_3" text:outline-level="3">What "Complaint Density" Actually Pulls</text:h>
      <text:p text:style-name="Text_20_body">This is the part that makes it intelligent instead of just sorting by sales count. For every top-selling product, the system reads its reviews/comments and extracts recurring complaints using Claude API:</text:p>
      <text:p text:style-name="Preformatted_20_Text"><text:soft-page-break/><text:span text:style-name="Source_20_Text">Input: 40 reviews from top React Native booking template</text:span></text:p>
      <text:p text:style-name="Preformatted_20_Text"><text:span text:style-name="Source_20_Text">Claude extracts: "12 reviews mention broken iOS build since SDK 50 update"</text:span></text:p>
      <text:p text:style-name="Preformatted_20_Text"><text:span text:style-name="Source_20_Text"><text:s text:c="17"/>"8 reviews mention no dark mode support"</text:span></text:p>
      <text:p text:style-name="Preformatted_20_Text"><text:span text:style-name="Source_20_Text"><text:s text:c="17"/>"5 reviews mention abandoned support, no response in 6 months"</text:span></text:p>
      <text:p text:style-name="Preformatted_20_Text"/>
      <text:p text:style-name="P1"><text:span text:style-name="Source_20_Text">Output: Your exact differentiator list for the rebuild</text:span></text:p>
      <text:p text:style-name="Text_20_body">That's the actual gap. Not "category is trending." <text:span text:style-name="Strong_20_Emphasis">"860 people already paid for this exact thing and 12 of them are angry about one specific broken feature."</text:span></text:p>
      <text:p text:style-name="Horizontal_20_Line"/>
      <text:h text:style-name="Heading_20_3" text:outline-level="3">The Action Card — Final Output Format</text:h>
      <text:p text:style-name="Preformatted_20_Text"><text:span text:style-name="Source_20_Text">═══════════════════════════════════</text:span></text:p>
      <text:p text:style-name="Preformatted_20_Text"><text:span text:style-name="Source_20_Text">PRODUCT GAP #1 — HIGH CONFIDENCE</text:span></text:p>
      <text:p text:style-name="Preformatted_20_Text"><text:span text:style-name="Source_20_Text">═══════════════════════════════════</text:span></text:p>
      <text:p text:style-name="Preformatted_20_Text"><text:span text:style-name="Source_20_Text">Source: CodeCanyon</text:span></text:p>
      <text:p text:style-name="Preformatted_20_Text"><text:span text:style-name="Source_20_Text">Original product: [name], 860 sales, $39</text:span></text:p>
      <text:p text:style-name="Preformatted_20_Text"><text:span text:style-name="Source_20_Text">Gap: iOS build broken since Expo SDK 50 (12 complaints)</text:span></text:p>
      <text:p text:style-name="Preformatted_20_Text"><text:span text:style-name="Source_20_Text"><text:s text:c="5"/>No dark mode (8 complaints)</text:span></text:p>
      <text:p text:style-name="Preformatted_20_Text"><text:span text:style-name="Source_20_Text"><text:s text:c="5"/>Abandoned support (5 complaints)</text:span></text:p>
      <text:p text:style-name="Preformatted_20_Text"/>
      <text:p text:style-name="Preformatted_20_Text"><text:span text:style-name="Source_20_Text">BUILD SPEC:</text:span></text:p>
      <text:p text:style-name="Preformatted_20_Text"><text:span text:style-name="Source_20_Text">- Same core scope as original</text:span></text:p>
      <text:p text:style-name="Preformatted_20_Text"><text:span text:style-name="Source_20_Text">- Expo SDK 52, fixed iOS build</text:span></text:p>
      <text:p text:style-name="Preformatted_20_Text"><text:span text:style-name="Source_20_Text">- Dark mode included</text:span></text:p>
      <text:p text:style-name="Preformatted_20_Text"><text:span text:style-name="Source_20_Text">- Active support commitment in listing copy</text:span></text:p>
      <text:p text:style-name="Preformatted_20_Text"/>
      <text:p text:style-name="Preformatted_20_Text"><text:span text:style-name="Source_20_Text">Price: $39 (matches proven tolerance)</text:span></text:p>
      <text:p text:style-name="Preformatted_20_Text"><text:span text:style-name="Source_20_Text">Est. build time: 2 days (you already know Expo)</text:span></text:p>
      <text:p text:style-name="Preformatted_20_Text"><text:span text:style-name="Source_20_Text">Confidence: 860 sales proves demand exists</text:span></text:p>
      <text:p text:style-name="P1"><text:span text:style-name="Source_20_Text">═══════════════════════════════════</text:span></text:p>
      <text:p text:style-name="Text_20_body">That's a direct action point. You read it, you know exactly what to build, why, and what price to charge.</text:p>
      <text:p text:style-name="Horizontal_20_Line"/>
      <text:h text:style-name="Heading_20_2" text:outline-level="2">Why This Is Different From What I Gave You Before</text:h>
      <table:table table:name="Table2" table:style-name="Table2">
        <table:table-column table:style-name="Table2.A"/>
        <table:table-column table:style-name="Table2.B"/>
        <table:table-header-rows>
          <table:table-row>
            <table:table-cell table:style-name="Table2.A1" office:value-type="string">
              <text:p text:style-name="Table_20_Heading">Before</text:p>
            </table:table-cell>
            <table:table-cell table:style-name="Table2.A1" office:value-type="string">
              <text:p text:style-name="Table_20_Heading">Now</text:p>
            </table:table-cell>
          </table:table-row>
        </table:table-header-rows>
        <table:table-row>
          <table:table-cell table:style-name="Table2.A1" office:value-type="string">
            <text:p text:style-name="Table_20_Contents">"This category has activity"</text:p>
          </table:table-cell>
          <table:table-cell table:style-name="Table2.A1" office:value-type="string">
            <text:p text:style-name="Table_20_Contents">"This exact product has this exact weakness"</text:p>
          </table:table-cell>
        </table:table-row>
        <table:table-row>
          <table:table-cell table:style-name="Table2.A1" office:value-type="string">
            <text:p text:style-name="Table_20_Contents">You still have to decide what to build</text:p>
          </table:table-cell>
          <table:table-cell table:style-name="Table2.A1" office:value-type="string">
            <text:p text:style-name="Table_20_Contents">The system tells you what to build</text:p>
          </table:table-cell>
        </table:table-row>
        <table:table-row>
          <table:table-cell table:style-name="Table2.A1" office:value-type="string">
            <text:p text:style-name="Table_20_Contents">Category-level scoring</text:p>
          </table:table-cell>
          <table:table-cell table:style-name="Table2.A1" office:value-type="string">
            <text:p text:style-name="Table_20_Contents">Product-level gap extraction</text:p>
          </table:table-cell>
        </table:table-row>
        <table:table-row>
          <table:table-cell table:style-name="Table2.A1" office:value-type="string">
            <text:p text:style-name="Table_20_Contents">Generic</text:p>
          </table:table-cell>
          <table:table-cell table:style-name="Table2.A1" office:value-type="string">
            <text:p text:style-name="Table_20_Contents">Specific build spec with price</text:p>
          </table:table-cell>
        </table:table-row>
      </table:table>
      <text:p text:style-name="Horizontal_20_Line"/>
      <text:h text:style-name="Heading_20_2" text:outline-level="2">Build Estimate (revised)</text:h>
      <text:list text:style-name="L4">
        <text:list-item>
          <text:p text:style-name="P8">Platform adapters (CodeCanyon, Getly, Gumroad <text:span text:style-name="T1">and the rest</text:span>)</text:p>
        </text:list-item>
        <text:list-item>
          <text:p text:style-name="P8">Gap detection scoring engine: </text:p>
        </text:list-item>
        <text:list-item>
          <text:p text:style-name="P8"><text:span text:style-name="T1">AI model </text:span>API complaint extraction layer: </text:p>
        </text:list-item>
        <text:list-item>
          <text:p text:style-name="P9">Action card output + simple dashboard: </text:p>
        </text:list-item>
        <text:list-item>
          <text:p text:style-name="P9"><text:soft-page-break/>Runs on GCP,<text:line-break/><text:line-break/><text:line-break/>“<text:span text:style-name="T2">QN.</text:span> What's a product gap we shd be hunting. Shd it be a product not yet built and people are demanding it, there's active demand? Shd it be products for improvement ie. Product x people want a better one, what gaps exactly are we talking...”</text:p>
          <text:p text:style-name="P9"/>
        </text:list-item>
      </text:list>
      <text:h text:style-name="Heading_20_2" text:outline-level="2">The Three Possible "Gap" Types — Honestly Ranked</text:h>
      <text:h text:style-name="Heading_20_3" text:outline-level="3">Type 1 — Unmet Demand (Nobody's Built It Yet)</text:h>
      <text:p text:style-name="Text_20_body">People asking publicly for something that doesn't exist on the platform.</text:p>
      <text:p text:style-name="Text_20_body"><text:span text:style-name="Strong_20_Emphasis">Reality check:</text:span> This is the riskiest type and the one most people romanticise. If real demand existed and nobody built it, on a marketplace with thousands of sellers actively hunting for exactly this — that's suspicious. Usually means one of three things: the build is harder than it looks, the market is smaller than the noise suggests, or it's already been tried and failed quietly.</text:p>
      <text:p text:style-name="Text_20_body"><text:span text:style-name="Strong_20_Emphasis">Verdict: Lowest confidence. Avoid as a primary hunt.</text:span></text:p>
      <text:p text:style-name="Horizontal_20_Line"/>
      <text:h text:style-name="Heading_20_3" text:outline-level="3">Type 2 — Existing Product, Documented Weakness (Improvement Gap)</text:h>
      <text:p text:style-name="Text_20_body">Product already selling. Real buyers. Real complaints in reviews about something specific and fixable.</text:p>
      <text:p text:style-name="Text_20_body"><text:span text:style-name="Strong_20_Emphasis">Reality check:</text:span> This is what the 860-sale React Native example showed. Demand is already proven by cash already spent. The complaint tells you exactly what to fix. Risk is low because you're not guessing if people will pay — they already did, for a worse version.</text:p>
      <text:p text:style-name="Text_20_body"><text:span text:style-name="Strong_20_Emphasis">Verdict: Highest confidence. This is the real hunt.</text:span></text:p>
      <text:p text:style-name="Horizontal_20_Line"/>
      <text:h text:style-name="Heading_20_3" text:outline-level="3">Type 3 — Existing Product, Stale But No Complaints (Obsolescence Gap)</text:h>
      <text:p text:style-name="Text_20_body">Product still selling fine, no major complaints, but technically outdated (old framework version, deprecated dependency, abandoned by seller — no updates in 1-2 years).</text:p>
      <text:p text:style-name="Text_20_body"><text:span text:style-name="Strong_20_Emphasis">Reality check:</text:span> Buyers haven't complained yet because the product hasn't broken yet. But new buyers researching today will see "last updated 2024" and hesitate. This is a softer gap — not a fix-the-pain play, it's a fresher-alternative play.</text:p>
      <text:p text:style-name="Text_20_body"><text:span text:style-name="Strong_20_Emphasis">Verdict: Medium confidence. Good secondary hunt, not primary.</text:span></text:p>
      <text:p text:style-name="Horizontal_20_Line"/>
      <text:h text:style-name="Heading_20_2" text:outline-level="2">What The System Should Actually Hunt</text:h>
      <text:p text:style-name="Text_20_body"><text:span text:style-name="Strong_20_Emphasis">Primary target: Type 2.</text:span> Products with proven sales AND visible complaints about something specific and buildable in days, not weeks.</text:p>
      <text:p text:style-name="Text_20_body"><text:soft-page-break/><text:span text:style-name="Strong_20_Emphasis">Secondary target: Type 3.</text:span> Stale-but-functioning products as a faster, lower-risk parallel build when Type 2 isn't immediately available.</text:p>
      <text:p text:style-name="Text_20_body"><text:span text:style-name="Strong_20_Emphasis">Type 1 should be deprioritized entirely</text:span> unless it shows up as a side signal — meaning if Type 2 research surfaces a complaint that's really "I wish this did X completely differently," that can occasionally tip into a Type 1 opportunity organically. But hunting Type 1 directly is chasing noise.</text:p>
      <text:p text:style-name="Horizontal_20_Line"/>
      <text:h text:style-name="Heading_20_2" text:outline-level="2">The Sharper Filter For The System</text:h>
      <text:p text:style-name="Text_20_body">The gap score should weight like this:</text:p>
      <text:p text:style-name="Preformatted_20_Text"><text:span text:style-name="Source_20_Text">Type 2 signals (weight: highest)</text:span></text:p>
      <text:p text:style-name="Preformatted_20_Text"><text:span text:style-name="Source_20_Text">- Has sales history (proof of payment)</text:span></text:p>
      <text:p text:style-name="Preformatted_20_Text"><text:span text:style-name="Source_20_Text">- Has reviews with specific recurring complaints</text:span></text:p>
      <text:p text:style-name="Preformatted_20_Text"><text:span text:style-name="Source_20_Text">- Complaint is technically fixable in &lt;5 days</text:span></text:p>
      <text:p text:style-name="Preformatted_20_Text"/>
      <text:p text:style-name="Preformatted_20_Text"><text:span text:style-name="Source_20_Text">Type 3 signals (weight: medium)</text:span></text:p>
      <text:p text:style-name="Preformatted_20_Text"><text:span text:style-name="Source_20_Text">- Has sales history</text:span></text:p>
      <text:p text:style-name="Preformatted_20_Text"><text:span text:style-name="Source_20_Text">- No major complaints</text:span></text:p>
      <text:p text:style-name="Preformatted_20_Text"><text:span text:style-name="Source_20_Text">- But stale (&gt;12 months no update, deprecated stack)</text:span></text:p>
      <text:p text:style-name="Preformatted_20_Text"/>
      <text:p text:style-name="Preformatted_20_Text"><text:span text:style-name="Source_20_Text">Type 1 signals (weight: lowest, flag only, don't auto-prioritize)</text:span></text:p>
      <text:p text:style-name="Preformatted_20_Text"><text:span text:style-name="Source_20_Text">- Public request threads with no matching product</text:span></text:p>
      <text:p text:style-name="P1"><text:span text:style-name="Source_20_Text">- Used only as a tiebreaker or bonus insight</text:span></text:p>
      <text:p text:style-name="Horizontal_20_Line"/>
      <text:h text:style-name="Heading_20_2" text:outline-level="2">Bottom Line</text:h>
      <text:p text:style-name="Text_20_body">We're not hunting ideas. We're hunting <text:span text:style-name="Strong_20_Emphasis">already-paid-for products with a documented, fixable flaw.</text:span> That's the entire model. It removes the guesswork on whether people will pay — they already did, for something worse than what you'll build.</text:p>
      <text:p text:style-name="Text_20_body">Want me to lock this as the scoring priority and start building the CodeCanyon adapter around exactly this Type 2 logic?</text:p>
      <text:p text:style-name="Text_20_body">Good catch. Let's define this precisely because it's been used loosely.</text:p>
      <text:p text:style-name="Horizontal_20_Line"/>
      <text:h text:style-name="Heading_20_2" text:outline-level="2">What "Reverse Engineer The Platform" Actually Means</text:h>
      <text:p text:style-name="Text_20_body">Two separate things got bundled into one phrase across this conversation. Need to split them:</text:p>
      <text:p text:style-name="Text_20_body"><text:span text:style-name="Strong_20_Emphasis">Reverse engineer the MARKET</text:span> = finding what already sells, what's missing, what's broken. That's the Type 2 gap hunt we just locked.</text:p>
      <text:p text:style-name="Text_20_body"><text:span text:style-name="Strong_20_Emphasis">Reverse engineer the PLATFORM</text:span> = understanding the algorithm/mechanics that decide whether a listing gets seen at all, regardless of how good the product is.</text:p>
      <text:p text:style-name="Text_20_body">You can solve the first and still fail completely if you ignore the second. A perfect product that never surfaces in search or browse is functionally a dead product. This is the missing layer. Let's build it.</text:p>
      <text:p text:style-name="Horizontal_20_Line"><text:soft-page-break/></text:p>
      <text:h text:style-name="Heading_20_2" text:outline-level="2">Why This Matters — The Real Failure Mode</text:h>
      <text:p text:style-name="Text_20_body">A product can have zero competition, fix a real complaint, priced correctly — and still get <text:span text:style-name="Strong_20_Emphasis">zero sales</text:span> because:</text:p>
      <text:list text:style-name="L5">
        <text:list-item>
          <text:p text:style-name="P11">It never appears in default search sort order </text:p>
        </text:list-item>
        <text:list-item>
          <text:p text:style-name="P11">New listings get buried under "best selling" sort which favors old established items </text:p>
        </text:list-item>
        <text:list-item>
          <text:p text:style-name="P11">Tags/keywords don't match what buyers actually search </text:p>
        </text:list-item>
        <text:list-item>
          <text:p text:style-name="P10">The platform's algorithm requires a minimum sales velocity to unlock further visibility (a cold-start trap) </text:p>
        </text:list-item>
      </text:list>
      <text:p text:style-name="Text_20_body">This is the part most sellers never diagnose. They think the product failed. Actually the algorithm never showed it to anyone.</text:p>
      <text:p text:style-name="Horizontal_20_Line"/>
      <text:h text:style-name="Heading_20_2" text:outline-level="2">The Platform Reverse Engineering Logic</text:h>
      <text:h text:style-name="Heading_20_3" text:outline-level="3">Step 1 — Map the Ranking/Sort Mechanics</text:h>
      <text:p text:style-name="Text_20_body">For each platform, the system needs to know, specifically:</text:p>
      <text:p text:style-name="Preformatted_20_Text"><text:span text:style-name="Source_20_Text">CodeCanyon:</text:span></text:p>
      <text:p text:style-name="Preformatted_20_Text"><text:span text:style-name="Source_20_Text">- Default sort = "Relevance" then options for "Best Selling," "Newest," "Trending"</text:span></text:p>
      <text:p text:style-name="Preformatted_20_Text"><text:span text:style-name="Source_20_Text">- New items get placed in "Newest" feed automatically — guaranteed temporary visibility</text:span></text:p>
      <text:p text:style-name="Preformatted_20_Text"><text:span text:style-name="Source_20_Text">- "Trending" requires velocity (sales in short window), not total sales</text:span></text:p>
      <text:p text:style-name="P1"><text:span text:style-name="Source_20_Text">- Tags directly map to search — keyword precision matters more than description quality</text:span></text:p>
      <text:p text:style-name="Text_20_body">This has to be researched per platform, not assumed. Wrong assumption here kills the whole plan even with a perfect product.</text:p>
      <text:h text:style-name="Heading_20_3" text:outline-level="3">Step 2 — Identify The Visibility Window</text:h>
      <text:p text:style-name="Text_20_body">Every platform has some form of "new item gets temporary boost" mechanic — it's how they solve their own cold-start problem (they need new listings to keep the catalog fresh). The system needs to know:</text:p>
      <text:list text:style-name="L6">
        <text:list-item>
          <text:p text:style-name="P13">How long does that window last </text:p>
        </text:list-item>
        <text:list-item>
          <text:p text:style-name="P13">What sort/filter surfaces it during that window </text:p>
        </text:list-item>
        <text:list-item>
          <text:p text:style-name="P12">What action maximizes exposure during that window (reviews, early sales velocity, etc.) </text:p>
        </text:list-item>
      </text:list>
      <text:p text:style-name="Text_20_body">This is the actual exploit. Not gaming the algorithm dishonestly — using the platform's own onboarding mechanic correctly instead of ignoring it.</text:p>
      <text:h text:style-name="Heading_20_3" text:outline-level="3">Step 3 — Build The "Will This Surface" Pre-Check</text:h>
      <text:p text:style-name="Text_20_body">Before committing to build anything, run this check:</text:p>
      <text:p text:style-name="Preformatted_20_Text"><text:span text:style-name="Source_20_Text">def will_surface(platform, product_plan):</text:span></text:p>
      <text:p text:style-name="Preformatted_20_Text"><text:span text:style-name="Source_20_Text"><text:s text:c="4"/>checks = {</text:span></text:p>
      <text:p text:style-name="Preformatted_20_Text"><text:soft-page-break/><text:span text:style-name="Source_20_Text"><text:s text:c="8"/>"keyword_match": tags_match_search_volume(product_plan.tags),</text:span></text:p>
      <text:p text:style-name="Preformatted_20_Text"><text:span text:style-name="Source_20_Text"><text:s text:c="8"/>"category_density": category_listing_count(product_plan.category),</text:span></text:p>
      <text:p text:style-name="Preformatted_20_Text"><text:span text:style-name="Source_20_Text"><text:s text:c="8"/>"new_item_window_exists": platform.has_new_item_boost,</text:span></text:p>
      <text:p text:style-name="Preformatted_20_Text"><text:span text:style-name="Source_20_Text"><text:s text:c="8"/>"minimum_velocity_required": platform.trending_requires_sales_in_days,</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if checks["category_density"] &gt; 500 and checks["new_item_window_exists"] == False:</text:span></text:p>
      <text:p text:style-name="Preformatted_20_Text"><text:span text:style-name="Source_20_Text"><text:s text:c="8"/>return "HIGH RISK — will get buried, no platform mechanic to rescue visibility"</text:span></text:p>
      <text:p text:style-name="Preformatted_20_Text"><text:span text:style-name="Source_20_Text"><text:s text:c="4"/></text:span></text:p>
      <text:p text:style-name="P1"><text:span text:style-name="Source_20_Text"><text:s text:c="4"/>return "VIABLE — platform has a visibility path"</text:span></text:p>
      <text:h text:style-name="Heading_20_3" text:outline-level="3">Step 4 — Detect Already-Dead Listings (Your "Ghost Town" Ask, Refined)</text:h>
      <text:p text:style-name="Text_20_body">This is different from category-level ghost towns. This is product-level: a listing that exists, looks fine, but is functionally invisible.</text:p>
      <text:p text:style-name="Text_20_body"><text:span text:style-name="Strong_20_Emphasis">Signal pattern for a dead/buried listing:</text:span></text:p>
      <text:p text:style-name="Preformatted_20_Text"><text:span text:style-name="Source_20_Text">def is_ghost_listing(listing):</text:span></text:p>
      <text:p text:style-name="Preformatted_20_Text"><text:span text:style-name="Source_20_Text"><text:s text:c="4"/>signals = []</text:span></text:p>
      <text:p text:style-name="Preformatted_20_Text"><text:span text:style-name="Source_20_Text"><text:s text:c="4"/>if listing.sales_count &lt; 3 and months_since(listing.published) &gt; 6:</text:span></text:p>
      <text:p text:style-name="Preformatted_20_Text"><text:span text:style-name="Source_20_Text"><text:s text:c="8"/>signals.append("Long-published, near-zero sales = buried, not unwanted")</text:span></text:p>
      <text:p text:style-name="Preformatted_20_Text"><text:span text:style-name="Source_20_Text"><text:s text:c="4"/>if listing.reviews_count == 0 and listing.sales_count &gt; 0:</text:span></text:p>
      <text:p text:style-name="Preformatted_20_Text"><text:span text:style-name="Source_20_Text"><text:s text:c="8"/>signals.append("Sold but no reviews = no return buyers, weak product-market signal")</text:span></text:p>
      <text:p text:style-name="Preformatted_20_Text"><text:span text:style-name="Source_20_Text"><text:s text:c="4"/>if listing.search_rank_position &gt; 50:</text:span></text:p>
      <text:p text:style-name="Preformatted_20_Text"><text:span text:style-name="Source_20_Text"><text:s text:c="8"/>signals.append("Doesn't appear in first 3 pages of relevant search = invisible")</text:span></text:p>
      <text:p text:style-name="P1"><text:span text:style-name="Source_20_Text"><text:s text:c="4"/>return signals</text:span></text:p>
      <text:p text:style-name="Text_20_body">Why this matters for you specifically: it tells the difference between <text:span text:style-name="Strong_20_Emphasis">"nobody wants this"</text:span> and <text:span text:style-name="Strong_20_Emphasis">"this exists but the algorithm buried it."</text:span> Misreading that distinction is exactly how someone ends up copying a dead product thinking it's proof of demand, when actually it's proof of invisibility.</text:p>
      <text:p text:style-name="Horizontal_20_Line"/>
      <text:h text:style-name="Heading_20_2" text:outline-level="2">The Combined Logic — Full Pipeline</text:h>
      <text:p text:style-name="Preformatted_20_Text"><text:span text:style-name="Source_20_Text">1. MARKET GAP HUNT (Type 2 — proven sales + fixable complaint)</text:span></text:p>
      <text:p text:style-name="Preformatted_20_Text"><text:span text:style-name="Source_20_Text"><text:s text:c="8"/>↓</text:span></text:p>
      <text:p text:style-name="Preformatted_20_Text"><text:span text:style-name="Source_20_Text">2. PLATFORM VISIBILITY CHECK (will this even surface)</text:span></text:p>
      <text:p text:style-name="Preformatted_20_Text"><text:span text:style-name="Source_20_Text"><text:s text:c="8"/>↓</text:span></text:p>
      <text:p text:style-name="Preformatted_20_Text"><text:span text:style-name="Source_20_Text">3. GHOST LISTING FILTER (exclude buried products from "proof of demand" data)</text:span></text:p>
      <text:p text:style-name="Preformatted_20_Text"><text:span text:style-name="Source_20_Text"><text:s text:c="8"/>↓</text:span></text:p>
      <text:p text:style-name="P1"><text:span text:style-name="Source_20_Text">4. ACTION CARD OUTPUT (only if it survives all three filters)</text:span></text:p>
      <text:p text:style-name="Text_20_body">A product idea only becomes an action card if it passes all three. Proven demand alone isn't enough anymore — it has to also have a visibility path on that specific platform.</text:p>
      <text:p text:style-name="Horizontal_20_Line"/>
      <text:h text:style-name="Heading_20_2" text:outline-level="2">The Edge This Actually Gives You</text:h>
      <text:p text:style-name="Text_20_body">Most sellers fail not because their product was bad, but because they ignored step 2 and 3 entirely. They built based on demand signals from a listing that itself was invisible — copying a ghost, not a winner.</text:p>
      <text:p text:style-name="Text_20_body"><text:soft-page-break/>Your system filters that out before you spend 2 days building. That's the actual edge.</text:p>
      <text:p text:style-name="Horizontal_20_Lin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thropic Sans" svg:font-family="'Anthropic Sans', system-ui, 'Segoe UI', Roboto, Helvetica, Arial, sans-serif"/>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7-01T10:56:25.043000000</meta:creation-date>
    <dc:date>2026-07-01T11:23:49.973000000</dc:date>
    <meta:editing-duration>PT1M39S</meta:editing-duration>
    <meta:editing-cycles>1</meta:editing-cycles>
    <meta:document-statistic meta:table-count="2" meta:image-count="0" meta:object-count="0" meta:page-count="9" meta:paragraph-count="241" meta:word-count="2260" meta:character-count="15283" meta:non-whitespace-character-count="12874"/>
    <meta:generator>LibreOffice/24.2.4.2$Windows_X86_64 LibreOffice_project/51a6219feb6075d9a4c46691dcfe0cd9c4fff3c2</meta:generator>
  </office:meta>
</office:document-meta>
</file>